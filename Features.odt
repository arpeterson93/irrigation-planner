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bd36" officeooo:paragraph-rsid="000bbd36"/>
    </style:style>
    <style:style style:name="P2" style:family="paragraph" style:parent-style-name="Standard" style:list-style-name="L1">
      <style:text-properties officeooo:rsid="00187216" officeooo:paragraph-rsid="00187216"/>
    </style:style>
    <style:style style:name="P3" style:family="paragraph" style:parent-style-name="Standard" style:list-style-name="L1">
      <style:text-properties officeooo:rsid="000bbd36" officeooo:paragraph-rsid="000bbd36"/>
    </style:style>
    <style:style style:name="P4" style:family="paragraph" style:parent-style-name="Standard" style:list-style-name="L1">
      <style:text-properties officeooo:rsid="000cece7" officeooo:paragraph-rsid="00187216"/>
    </style:style>
    <style:style style:name="P5" style:family="paragraph" style:parent-style-name="Standard" style:list-style-name="L1">
      <style:text-properties officeooo:rsid="000dc3a9" officeooo:paragraph-rsid="00187216"/>
    </style:style>
    <style:style style:name="P6" style:family="paragraph" style:parent-style-name="Standard" style:list-style-name="L1">
      <style:text-properties officeooo:rsid="000fb3f4" officeooo:paragraph-rsid="000fb3f4"/>
    </style:style>
    <style:style style:name="P7" style:family="paragraph" style:parent-style-name="Standard" style:list-style-name="L1">
      <style:text-properties officeooo:rsid="001076e0" officeooo:paragraph-rsid="001076e0"/>
    </style:style>
    <style:style style:name="P8" style:family="paragraph" style:parent-style-name="Standard" style:list-style-name="L1">
      <style:text-properties officeooo:rsid="00109a6b" officeooo:paragraph-rsid="00109a6b"/>
    </style:style>
    <style:style style:name="P9" style:family="paragraph" style:parent-style-name="Standard" style:list-style-name="L1">
      <style:text-properties officeooo:rsid="0014304b" officeooo:paragraph-rsid="0014304b"/>
    </style:style>
    <style:style style:name="P10" style:family="paragraph" style:parent-style-name="Standard" style:list-style-name="L1">
      <style:text-properties officeooo:rsid="00155538" officeooo:paragraph-rsid="00155538"/>
    </style:style>
    <style:style style:name="P11" style:family="paragraph" style:parent-style-name="Standard" style:list-style-name="L1">
      <style:text-properties officeooo:rsid="00169e47" officeooo:paragraph-rsid="00169e47"/>
    </style:style>
    <style:style style:name="T1" style:family="text">
      <style:text-properties officeooo:rsid="00187216"/>
    </style:style>
    <style:style style:name="T2" style:family="text">
      <style:text-properties officeooo:rsid="001a654a"/>
    </style:style>
    <style:style style:name="T3" style:family="text">
      <style:text-properties officeooo:rsid="0018149f"/>
    </style:style>
    <style:style style:name="T4" style:family="text">
      <style:text-properties officeooo:rsid="001b9478"/>
    </style:style>
    <style:style style:name="T5" style:family="text">
      <style:text-properties officeooo:rsid="001c789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:</text:p>
      <text:list text:style-name="L1">
        <text:list-item>
          <text:p text:style-name="P2">Option to have schedule apply across all zones</text:p>
        </text:list-item>
        <text:list-item>
          <text:p text:style-name="P3">GPM calc should have space for meter entry #s <text:span text:style-name="T1">(before and after) </text:span>and then calculate flow for you.</text:p>
        </text:list-item>
        <text:list-item>
          <text:p text:style-name="P4">Have coverage heatmap, dead space go behind the water, so you can see where it’s being wasted</text:p>
        </text:list-item>
        <text:list-item>
          <text:p text:style-name="P5">New Head ID should just be like H and then highest existing value+1</text:p>
        </text:list-item>
        <text:list-item>
          <text:p text:style-name="P6">Yard Preview bigger on page, maybe a full-width section?</text:p>
        </text:list-item>
        <text:list-item>
          <text:p text:style-name="P6">Have it calculate sq ft <text:span text:style-name="T1">of area </text:span>in each Yard zone</text:p>
        </text:list-item>
        <text:list-item>
          <text:p text:style-name="P6">What does it mean by “not a catch-can audit” – why isn’t this the case?</text:p>
        </text:list-item>
        <text:list-item>
          <text:p text:style-name="P6">Water Usage Estimate – Zone should always just have the flow (GPM) assigned per the Page 1</text:p>
        </text:list-item>
        <text:list-item>
          <text:p text:style-name="P6">Since we can only make one top-side seasonal adjustment, the 7-day outlook can show all runtimes for each zone, not specific to 1 zone. Also, the adjustment can only be to the nearest 10% from 10%-150%. I guess if it’s coming out higher than 150%, maybe just add a flag/warning there?</text:p>
        </text:list-item>
        <text:list-item>
          <text:p text:style-name="P7">Have most granular measurement be 1 ft, not ½ ft. Default grid to 1 ft.</text:p>
        </text:list-item>
        <text:list-item>
          <text:p text:style-name="P7">Probably don’t need Zone name for the Sprinkler zones</text:p>
        </text:list-item>
        <text:list-item>
          <text:p text:style-name="P7"><text:span text:style-name="T2">Would need to discuss implementation: </text:span>Maybe have multiple scenarios, one is like long-term watering, one is short-term (seeding?)</text:p>
        </text:list-item>
        <text:list-item>
          <text:p text:style-name="P7">Confirm Forecast calculation <text:span text:style-name="T2">works correctly</text:span>, <text:span text:style-name="T3">available variable flexibility </text:span><text:span text:style-name="T2">(% overrides available)</text:span></text:p>
        </text:list-item>
        <text:list-item>
          <text:p text:style-name="P8">Any optimizer functions? <text:span text:style-name="T4">Like would there be a way to say like given the heads I have, optimize their arcs and angles and runtimes to get the best coverage per gallon out of the house.</text:span></text:p>
        </text:list-item>
        <text:list-item>
          <text:p text:style-name="P9">Handling of like multiple cycles/day, when to set the water start times so they don’t overlap <text:span text:style-name="T5">(in essence, how long is the total runtime of one of the cycles, so I know how much to stagger the start times if I’m doing multiple cycles)</text:span></text:p>
        </text:list-item>
        <text:list-item>
          <text:p text:style-name="P10">Move Head Type left in table since it’s so important <text:span text:style-name="T5">(immediately to the right of Zone column)</text:span>, capitalize dropdown values</text:p>
        </text:list-item>
        <text:list-item>
          <text:p text:style-name="P10">I don’t think we need Nozzle Family field</text:p>
        </text:list-item>
        <text:list-item>
          <text:p text:style-name="P11">When you click a <text:span text:style-name="T1">sprinkler </text:span>head to move it, the page scrolls – it like selects the table row, but makes you view it. It shouldn’t do th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7T15:20:03.418451900</meta:creation-date>
    <dc:date>2026-07-17T19:57:17.676802600</dc:date>
    <meta:editing-duration>PT4H37M6S</meta:editing-duration>
    <meta:editing-cycles>17</meta:editing-cycles>
    <meta:generator>LibreOffice/25.8.7.3$Windows_X86_64 LibreOffice_project/30742500f2d3eb4366ac312fa33d3dcabdb3eba5</meta:generator>
    <meta:document-statistic meta:table-count="0" meta:image-count="0" meta:object-count="0" meta:page-count="1" meta:paragraph-count="19" meta:word-count="363" meta:character-count="1952" meta:non-whitespace-character-count="1623"/>
  </office:meta>
</office:document-meta>
</file>